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DejaVu Sans Mono" svg:font-family="DejaVu Sans Mono" style:font-family-generic="modern" style:font-pitch="fixed" svg:panose-1="2 11 6 9 3 8 4 2 2 4"/>
    <style:font-face style:name="Cambria Math" svg:font-family="Cambria Math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number text:level="1" style:num-suffix="." style:num-format="1" text:start-value="3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3" style:parent-style-name="Policepardéfaut" style:family="text">
      <style:text-properties style:font-name="Segoe UI Symbol" style:font-name-asian="Times New Roman" style:font-name-complex="Segoe UI Symbol" fo:font-size="10pt" style:font-size-asian="10pt" style:font-size-complex="10pt" style:language-asian="fr" style:country-asian="FR"/>
    </style:style>
    <style:style style:name="T4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8" style:parent-style-name="Policepardéfaut" style:family="text">
      <style:text-properties style:font-name="Segoe UI Symbol" style:font-name-asian="Times New Roman" style:font-name-complex="Segoe UI Symbol" fo:font-size="10pt" style:font-size-asian="10pt" style:font-size-complex="10pt" style:language-asian="fr" style:country-asian="FR"/>
    </style:style>
    <style:style style:name="T9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26" style:parent-style-name="Policepardéfaut" style:family="text">
      <style:text-properties style:font-name="Segoe UI Symbol" style:font-name-asian="Times New Roman" style:font-name-complex="Segoe UI Symbol" fo:font-size="10pt" style:font-size-asian="10pt" style:font-size-complex="10pt" style:language-asian="fr" style:country-asian="FR"/>
    </style:style>
    <style:style style:name="T27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3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3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3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3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4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4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4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4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4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4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4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5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5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5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3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54" style:parent-style-name="Policepardéfaut" style:family="text">
      <style:text-properties style:font-name="DejaVu Sans Mono" style:font-name-asian="Times New Roman" style:font-name-complex="DejaVu Sans Mono" fo:font-size="10pt" style:font-size-asian="10pt" style:font-size-complex="10pt" style:language-asian="fr" style:country-asian="FR"/>
    </style:style>
    <style:style style:name="T55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5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5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5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6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6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6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6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6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6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6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6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6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6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7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7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7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7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7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7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7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7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7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8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1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82" style:parent-style-name="Policepardéfaut" style:family="text">
      <style:text-properties style:font-name="Segoe UI Symbol" style:font-name-asian="Times New Roman" style:font-name-complex="Segoe UI Symbol" fo:font-size="10pt" style:font-size-asian="10pt" style:font-size-complex="10pt" style:language-asian="fr" style:country-asian="FR"/>
    </style:style>
    <style:style style:name="T83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8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8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8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7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88" style:parent-style-name="Policepardéfaut" style:family="text">
      <style:text-properties style:font-name="Segoe UI Symbol" style:font-name-asian="Times New Roman" style:font-name-complex="Segoe UI Symbol" fo:font-size="10pt" style:font-size-asian="10pt" style:font-size-complex="10pt" style:language-asian="fr" style:country-asian="FR"/>
    </style:style>
    <style:style style:name="T89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9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9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9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9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9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9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9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9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9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9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0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101" style:parent-style-name="Policepardéfaut" style:family="text">
      <style:text-properties style:font-name="Segoe UI Symbol" style:font-name-asian="Times New Roman" style:font-name-complex="Segoe UI Symbol" fo:font-size="10pt" style:font-size-asian="10pt" style:font-size-complex="10pt" style:language-asian="fr" style:country-asian="FR"/>
    </style:style>
    <style:style style:name="T102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0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0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0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0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0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0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0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11" style:parent-style-name="Normal" style:family="paragraph">
      <style:paragraph-properties fo:margin-bottom="0in" fo:line-height="100%"/>
    </style:style>
    <style:style style:name="T11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13" style:parent-style-name="Normal" style:family="paragraph">
      <style:paragraph-properties fo:margin-top="0.0694in" fo:margin-bottom="0.0694in" fo:line-height="100%"/>
    </style:style>
    <style:style style:name="T114" style:parent-style-name="Policepardéfaut" style:family="text">
      <style:text-properties style:font-name="Cambria Math" style:font-name-asian="Times New Roman" style:font-name-complex="Cambria Math" fo:font-weight="bold" style:font-weight-asian="bold" style:font-weight-complex="bold" fo:font-size="18pt" style:font-size-asian="18pt" style:font-size-complex="18pt" style:language-asian="fr" style:country-asian="FR"/>
    </style:style>
    <style:style style:name="T11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11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17" style:parent-style-name="Normal" style:family="paragraph">
      <style:paragraph-properties fo:margin-top="0.0694in" fo:margin-bottom="0.0694in" fo:line-height="100%"/>
    </style:style>
    <style:style style:name="T11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19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2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2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22" style:parent-style-name="Normal" style:family="paragraph">
      <style:paragraph-properties fo:margin-top="0.0694in" fo:margin-bottom="0.0694in" fo:line-height="100%"/>
    </style:style>
    <style:style style:name="T12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24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2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26" style:parent-style-name="Normal" style:family="paragraph">
      <style:paragraph-properties fo:margin-bottom="0in" fo:line-height="100%"/>
    </style:style>
    <style:style style:name="T12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28" style:parent-style-name="Normal" style:family="paragraph">
      <style:paragraph-properties fo:margin-top="0.0694in" fo:margin-bottom="0.0694in" fo:line-height="100%"/>
    </style:style>
    <style:style style:name="T129" style:parent-style-name="Policepardéfaut" style:family="text">
      <style:text-properties style:font-name="Segoe UI Symbol" style:font-name-asian="Times New Roman" style:font-name-complex="Segoe UI Symbol" fo:font-weight="bold" style:font-weight-asian="bold" style:font-weight-complex="bold" fo:font-size="18pt" style:font-size-asian="18pt" style:font-size-complex="18pt" style:language-asian="fr" style:country-asian="FR"/>
    </style:style>
    <style:style style:name="T13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1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3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3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3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3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4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43" style:parent-style-name="Normal" style:family="paragraph">
      <style:paragraph-properties fo:margin-bottom="0in" fo:line-height="100%"/>
    </style:style>
    <style:style style:name="T14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14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7" style:parent-style-name="Normal" style:family="paragraph">
      <style:paragraph-properties fo:margin-top="0.0694in" fo:margin-bottom="0.0694in" fo:line-height="100%"/>
    </style:style>
    <style:style style:name="T14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49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5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5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5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5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5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5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5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5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5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5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6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61" style:parent-style-name="Normal" style:family="paragraph">
      <style:paragraph-properties fo:margin-bottom="0in" fo:line-height="100%"/>
    </style:style>
    <style:style style:name="T16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63" style:parent-style-name="Normal" style:family="paragraph">
      <style:paragraph-properties fo:margin-top="0.0694in" fo:margin-bottom="0.0694in" fo:line-height="100%"/>
    </style:style>
    <style:style style:name="T164" style:parent-style-name="Policepardéfaut" style:family="text">
      <style:text-properties style:font-name="DejaVu Sans Mono" style:font-name-asian="Times New Roman" style:font-name-complex="DejaVu Sans Mono" fo:font-weight="bold" style:font-weight-asian="bold" style:font-weight-complex="bold" fo:font-size="18pt" style:font-size-asian="18pt" style:font-size-complex="18pt" style:language-asian="fr" style:country-asian="FR"/>
    </style:style>
    <style:style style:name="T16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16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16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6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6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7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7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7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73" style:parent-style-name="Normal" style:family="paragraph">
      <style:paragraph-properties fo:margin-bottom="0in" fo:line-height="100%"/>
    </style:style>
    <style:style style:name="T17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7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17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7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7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7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8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81" style:parent-style-name="Normal" style:family="paragraph">
      <style:paragraph-properties fo:margin-bottom="0in" fo:line-height="100%"/>
    </style:style>
    <style:style style:name="T18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8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18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8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8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87" style:parent-style-name="Normal" style:family="paragraph">
      <style:paragraph-properties fo:margin-top="0.0694in" fo:margin-bottom="0.0694in" fo:line-height="100%"/>
    </style:style>
    <style:style style:name="T188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89" style:parent-style-name="Normal" style:family="paragraph">
      <style:paragraph-properties fo:margin-top="0.0694in" fo:margin-bottom="0.0694in" fo:line-height="100%"/>
    </style:style>
    <style:style style:name="T190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9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9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93" style:parent-style-name="Normal" style:family="paragraph">
      <style:paragraph-properties fo:margin-bottom="0in" fo:line-height="100%"/>
    </style:style>
    <style:style style:name="T19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95" style:parent-style-name="Normal" style:family="paragraph">
      <style:paragraph-properties fo:margin-top="0.0694in" fo:margin-bottom="0.0694in" fo:line-height="100%"/>
    </style:style>
    <style:style style:name="T196" style:parent-style-name="Policepardéfaut" style:family="text">
      <style:text-properties style:font-name="Segoe UI Symbol" style:font-name-asian="Times New Roman" style:font-name-complex="Segoe UI Symbol" fo:font-weight="bold" style:font-weight-asian="bold" style:font-weight-complex="bold" fo:font-size="18pt" style:font-size-asian="18pt" style:font-size-complex="18pt" style:language-asian="fr" style:country-asian="FR"/>
    </style:style>
    <style:style style:name="T19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19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9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0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01" style:parent-style-name="Normal" style:family="paragraph">
      <style:paragraph-properties fo:margin-bottom="0in" fo:line-height="100%"/>
    </style:style>
    <style:style style:name="T20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03" style:parent-style-name="Normal" style:family="paragraph">
      <style:paragraph-properties fo:margin-top="0.0694in" fo:margin-bottom="0.0694in" fo:line-height="100%"/>
    </style:style>
    <style:style style:name="T204" style:parent-style-name="Policepardéfaut" style:family="text">
      <style:text-properties style:font-name="Segoe UI Symbol" style:font-name-asian="Times New Roman" style:font-name-complex="Segoe UI Symbol" fo:font-weight="bold" style:font-weight-asian="bold" style:font-weight-complex="bold" fo:font-size="18pt" style:font-size-asian="18pt" style:font-size-complex="18pt" style:language-asian="fr" style:country-asian="FR"/>
    </style:style>
    <style:style style:name="T20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206" style:parent-style-name="Normal" style:family="paragraph">
      <style:paragraph-properties fo:margin-top="0.0694in" fo:margin-bottom="0.0694in" fo:line-height="100%"/>
    </style:style>
    <style:style style:name="T207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20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09" style:parent-style-name="Normal" style:family="paragraph">
      <style:paragraph-properties fo:margin-top="0.0694in" fo:margin-bottom="0.0694in" fo:line-height="100%"/>
    </style:style>
    <style:style style:name="T210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21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1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13" style:parent-style-name="Normal" style:family="paragraph">
      <style:paragraph-properties fo:margin-bottom="0in" fo:line-height="100%"/>
    </style:style>
    <style:style style:name="T21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15" style:parent-style-name="Normal" style:family="paragraph">
      <style:paragraph-properties fo:margin-top="0.0694in" fo:margin-bottom="0.0694in" fo:line-height="100%"/>
    </style:style>
    <style:style style:name="T216" style:parent-style-name="Policepardéfaut" style:family="text">
      <style:text-properties style:font-name="Segoe UI Symbol" style:font-name-asian="Times New Roman" style:font-name-complex="Segoe UI Symbol" fo:font-weight="bold" style:font-weight-asian="bold" style:font-weight-complex="bold" fo:font-size="18pt" style:font-size-asian="18pt" style:font-size-complex="18pt" style:language-asian="fr" style:country-asian="FR"/>
    </style:style>
    <style:style style:name="T21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21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1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2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2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2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2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24" style:parent-style-name="Normal" style:family="paragraph">
      <style:paragraph-properties fo:margin-bottom="0in" fo:line-height="100%"/>
    </style:style>
    <style:style style:name="T22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26" style:parent-style-name="Normal" style:family="paragraph">
      <style:paragraph-properties fo:margin-top="0.0694in" fo:margin-bottom="0.0694in" fo:line-height="100%"/>
    </style:style>
    <style:style style:name="T227" style:parent-style-name="Policepardéfaut" style:family="text">
      <style:text-properties style:font-name="Segoe UI Symbol" style:font-name-asian="Times New Roman" style:font-name-complex="Segoe UI Symbol" fo:font-weight="bold" style:font-weight-asian="bold" style:font-weight-complex="bold" fo:font-size="18pt" style:font-size-asian="18pt" style:font-size-complex="18pt" style:language-asian="fr" style:country-asian="FR"/>
    </style:style>
    <style:style style:name="T22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229" style:parent-style-name="Normal" style:family="paragraph">
      <style:paragraph-properties fo:margin-top="0.0694in" fo:margin-bottom="0.0694in" fo:line-height="100%"/>
    </style:style>
    <style:style style:name="T230" style:parent-style-name="Policepardéfaut" style:family="text">
      <style:text-properties style:font-name="MS Gothic" style:font-name-asian="MS Gothic" style:font-name-complex="MS Gothic" fo:font-size="12pt" style:font-size-asian="12pt" style:font-size-complex="12pt" style:language-asian="fr" style:country-asian="FR"/>
    </style:style>
    <style:style style:name="T23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3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33" style:parent-style-name="Policepardéfaut" style:family="text">
      <style:text-properties style:font-name="MS Gothic" style:font-name-asian="MS Gothic" style:font-name-complex="MS Gothic" fo:font-size="12pt" style:font-size-asian="12pt" style:font-size-complex="12pt" style:language-asian="fr" style:country-asian="FR"/>
    </style:style>
    <style:style style:name="T23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3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36" style:parent-style-name="Policepardéfaut" style:family="text">
      <style:text-properties style:font-name="MS Gothic" style:font-name-asian="MS Gothic" style:font-name-complex="MS Gothic" fo:font-size="12pt" style:font-size-asian="12pt" style:font-size-complex="12pt" style:language-asian="fr" style:country-asian="FR"/>
    </style:style>
    <style:style style:name="T23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3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39" style:parent-style-name="Policepardéfaut" style:family="text">
      <style:text-properties style:font-name="MS Gothic" style:font-name-asian="MS Gothic" style:font-name-complex="MS Gothic" fo:font-size="12pt" style:font-size-asian="12pt" style:font-size-complex="12pt" style:language-asian="fr" style:country-asian="FR"/>
    </style:style>
    <style:style style:name="T24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4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42" style:parent-style-name="Policepardéfaut" style:family="text">
      <style:text-properties style:font-name="MS Gothic" style:font-name-asian="MS Gothic" style:font-name-complex="MS Gothic" fo:font-size="12pt" style:font-size-asian="12pt" style:font-size-complex="12pt" style:language-asian="fr" style:country-asian="FR"/>
    </style:style>
    <style:style style:name="T24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4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2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24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24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24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24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25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family="graphic" style:name="a6">
      <style:graphic-properties style:wrap="parallel" style:wrap-contour="false" style:writing-mode="lr-tb" draw:fill="solid" draw:fill-color="#a0a0a0" draw:opacity="100%" draw:stroke="none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solid" draw:fill-color="#a0a0a0" draw:opacity="100%" draw:stroke="none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solid" draw:fill-color="#a0a0a0" draw:opacity="100%" draw:stroke="none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solid" draw:fill-color="#a0a0a0" draw:opacity="100%" draw:stroke="none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solid" draw:fill-color="#a0a0a0" draw:opacity="100%" draw:stroke="none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solid" draw:fill-color="#a0a0a0" draw:opacity="100%" draw:stroke="none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solid" draw:fill-color="#a0a0a0" draw:opacity="100%" draw:stroke="none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solid" draw:fill-color="#a0a0a0" draw:opacity="100%" draw:stroke="none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solid" draw:fill-color="#a0a0a0" draw:opacity="100%" draw:stroke="none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solid" draw:fill-color="#a0a0a0" draw:opacity="100%" draw:stroke="none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#<text:s/></text:span><text:span text:style-name="T3">🏢</text:span><text:span text:style-name="T4"><text:s/>OpenSpace Organizer</text:span></text:p>
      <text:p text:style-name="P5"/>
      <text:p text:style-name="P6"><text:span text:style-name="T7">##<text:s/></text:span><text:span text:style-name="T8">📌</text:span><text:span text:style-name="T9"><text:s/>Description</text:span></text:p>
      <text:p text:style-name="P10"/>
      <text:p text:style-name="P11">OpenSpace Organizer is a Python Object-Oriented Programming (OOP) project<text:s/>that randomly assigns colleagues to seats in an open office space.</text:p>
      <text:p text:style-name="P12"/>
      <text:p text:style-name="P13">The goal is to simulate a daily reshuffling of seating arrangements so colleagues can work with different people every day.</text:p>
      <text:p text:style-name="P14"/>
      <text:p text:style-name="P15">The system is based on:</text:p>
      <text:p text:style-name="P16">- 6 tables</text:p>
      <text:p text:style-name="P17">- 4 seats per table</text:p>
      <text:p text:style-name="P18">- Total capacity: 24 seats</text:p>
      <text:p text:style-name="P19"/>
      <text:p text:style-name="P20">If there are more people than available seats, the extra people are stored in an overflow list.</text:p>
      <text:p text:style-name="P21"/>
      <text:p text:style-name="P22">---</text:p>
      <text:p text:style-name="P23"/>
      <text:p text:style-name="P24"><text:span text:style-name="T25">##<text:s/></text:span><text:span text:style-name="T26">🎯</text:span><text:span text:style-name="T27"><text:s/>Mission</text:span></text:p>
      <text:p text:style-name="P28"/>
      <text:p text:style-name="P29">Create an algorithm that:</text:p>
      <text:p text:style-name="P30">- Reads a list of colleagues from a text/CSV file</text:p>
      <text:p text:style-name="P31">- Randomly assigns them to seats in an open space</text:p>
      <text:p text:style-name="P32">- Displays the seating plan</text:p>
      <text:p text:style-name="P33">- Handles overflow (too many people)</text:p>
      <text:p text:style-name="P34">- Ensures a clean and modular architecture using OOP</text:p>
      <text:p text:style-name="P35"/>
      <text:p text:style-name="P36">---</text:p>
      <text:p text:style-name="P37"/>
      <text:p text:style-name="P38">## 🧠 Learning Objectives</text:p>
      <text:p text:style-name="P39"/>
      <text:p text:style-name="P40">This project focuses on:</text:p>
      <text:p text:style-name="P41"/>
      <text:p text:style-name="P42">- Object-Oriented Programming (OOP)</text:p>
      <text:p text:style-name="P43">- Clean use of functions and classes</text:p>
      <text:p text:style-name="P44">- Modular architecture</text:p>
      <text:p text:style-name="P45">- Python imports (clean and structured)</text:p>
      <text:p text:style-name="P46">- Reading external files (.txt / .csv)</text:p>
      <text:p text:style-name="P47">- Project structuring</text:p>
      <text:p text:style-name="P48">- GitHub workflow and repository organization</text:p>
      <text:p text:style-name="P49"/>
      <text:p text:style-name="P50">---</text:p>
      <text:p text:style-name="P51"/>
      <text:p text:style-name="P52"><text:span text:style-name="T53">##<text:s/></text:span><text:span text:style-name="T54">⚙</text:span><text:span text:style-name="T55">️ Features (MVP)</text:span></text:p>
      <text:p text:style-name="P56"/>
      <text:p text:style-name="P57">- Read colleagues from a file (`.txt` or `.csv`)</text:p>
      <text:p text:style-name="P58">- Randomly assign people to seats</text:p>
      <text:p text:style-name="P59">- Default setup: 6 tables × 4 seats = 24 seats</text:p>
      <text:p text:style-name="P60">- Display seating arrangement in terminal</text:p>
      <text:p text:style-name="P61">- Export results to `output.csv`</text:p>
      <text:p text:style-name="P62">- Handle overflow (people without seats)</text:p>
      <text:p text:style-name="P63">- Clean separation of logic using OOP</text:p>
      <text:p text:style-name="P64"/>
      <text:p text:style-name="P65">---</text:p>
      <text:p text:style-name="P66"/>
      <text:p text:style-name="P67">## 🧱 Project Structure</text:p>
      <text:p text:style-name="P68"/>
      <text:soft-page-break/>
      <text:p text:style-name="P69">challenge-openspace-classifier/<text:line-break/>│<text:line-break/>├── main.py<text:line-break/>├── README.md<text:line-break/>├── new_colleagues.csv<text:line-break/>├── output.csv<text:line-break/>├── config.json<text:line-break/>│<text:line-break/>├── notebook_guide.ipynb<text:line-break/>│<text:line-break/>└── utils/<text:line-break/>├── file_utils.py<text:line-break/>├── table.py<text:line-break/>└── openspace.py</text:p>
      <text:p text:style-name="P70"/>
      <text:p text:style-name="P71">---</text:p>
      <text:p text:style-name="P72"/>
      <text:p text:style-name="P73">## 🧩 Architecture Overview</text:p>
      <text:p text:style-name="P74"/>
      <text:p text:style-name="P75">The project is structured using three main classes:</text:p>
      <text:p text:style-name="P76"/>
      <text:p text:style-name="P77">### 🪑 Seat</text:p>
      <text:p text:style-name="P78">Represents a single seat in the open space.</text:p>
      <text:p text:style-name="P79"/>
      <text:p text:style-name="P80"><text:span text:style-name="T81">###<text:s/></text:span><text:span text:style-name="T82">🏷</text:span><text:span text:style-name="T83"><text:s/>Table</text:span></text:p>
      <text:p text:style-name="P84">Contains multiple seats and manages seat assignment.</text:p>
      <text:p text:style-name="P85"/>
      <text:p text:style-name="P86"><text:span text:style-name="T87">###<text:s/></text:span><text:span text:style-name="T88">🏢</text:span><text:span text:style-name="T89"><text:s/>OpenSpace</text:span></text:p>
      <text:p text:style-name="P90">Main controller that:</text:p>
      <text:p text:style-name="P91">- manages all tables</text:p>
      <text:p text:style-name="P92">- assigns people</text:p>
      <text:p text:style-name="P93">- handles overflow</text:p>
      <text:p text:style-name="P94">- displays results</text:p>
      <text:p text:style-name="P95">- manages statistics and dynamic features</text:p>
      <text:p text:style-name="P96"/>
      <text:p text:style-name="P97">---</text:p>
      <text:p text:style-name="P98"/>
      <text:p text:style-name="P99"><text:span text:style-name="T100">##<text:s/></text:span><text:span text:style-name="T101">🚀</text:span><text:span text:style-name="T102"><text:s/>Installation</text:span></text:p>
      <text:p text:style-name="P103"/>
      <text:p text:style-name="P104">1. Clone the repository:</text:p>
      <text:p text:style-name="P105">```bash</text:p>
      <text:p text:style-name="P106">git clone https://github.com/your-username/challenge-openspace-classifier.git</text:p>
      <text:list text:style-name="LFO1" text:continue-numbering="true">
        <text:list-item>
          <text:p text:style-name="P107">Move into the project:</text:p>
        </text:list-item>
      </text:list>
      <text:p text:style-name="P108">cd challenge-openspace-classifier</text:p>
      <text:list text:style-name="LFO2" text:continue-numbering="true">
        <text:list-item>
          <text:p text:style-name="P109">Run the program:</text:p>
        </text:list-item>
      </text:list>
      <text:p text:style-name="P110">python main.py</text:p>
      <text:p text:style-name="P111"><text:span text:style-name="T112"><draw:custom-shape svg:x="0in" svg:y="0in" svg:width="6.30417in" svg:height="0.08819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113"><text:span text:style-name="T114">▶</text:span><text:span text:style-name="T115">️ Usage</text:span></text:p>
      <text:soft-page-break/>
      <text:p text:style-name="P116">The program performs the following steps:</text:p>
      <text:list text:style-name="LFO3" text:continue-numbering="true">
        <text:list-item>
          <text:p text:style-name="P117"><text:span text:style-name="T118">Reads colleagues from<text:s/></text:span><text:span text:style-name="T119">new_colleagues.csv</text:span></text:p>
        </text:list-item>
        <text:list-item>
          <text:p text:style-name="P120">Randomly distributes them across the open space</text:p>
        </text:list-item>
        <text:list-item>
          <text:p text:style-name="P121">Displays the seating plan</text:p>
        </text:list-item>
        <text:list-item>
          <text:p text:style-name="P122"><text:span text:style-name="T123">Saves results to<text:s/></text:span><text:span text:style-name="T124">output.csv</text:span></text:p>
        </text:list-item>
        <text:list-item>
          <text:p text:style-name="P125">Prints overflow (if any)</text:p>
        </text:list-item>
      </text:list>
      <text:p text:style-name="P126"><text:span text:style-name="T127"><draw:custom-shape svg:x="0in" svg:y="0in" svg:width="6.30417in" svg:height="0.08819in" draw:z-index="0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span></text:p>
      <text:p text:style-name="P128"><text:span text:style-name="T129">📊</text:span><text:span text:style-name="T130"><text:s/>Example Output</text:span></text:p>
      <text:p text:style-name="P131">Table 1</text:p>
      <text:p text:style-name="P132">- Anna</text:p>
      <text:p text:style-name="P133">- Dan</text:p>
      <text:p text:style-name="P134">- Max</text:p>
      <text:p text:style-name="P135">- Hiba</text:p>
      <text:p text:style-name="P136"/>
      <text:p text:style-name="P137">Table 2</text:p>
      <text:p text:style-name="P138">- Victor</text:p>
      <text:p text:style-name="P139">- Neha</text:p>
      <text:p text:style-name="P140"/>
      <text:p text:style-name="P141">Overflow:</text:p>
      <text:p text:style-name="P142">["Ali", "Sara"]</text:p>
      <text:p text:style-name="P143"><text:span text:style-name="T144"><draw:custom-shape svg:x="0in" svg:y="0in" svg:width="6.30417in" svg:height="0.08819in" draw:z-index="0" draw:id="id2" draw:style-name="a2" draw:name="Horizontal Line 3" text:anchor-type="as-char"><svg:title/><svg:desc/><draw:enhanced-geometry draw:type="non-primitive" svg:viewBox="0 0 21600 21600" draw:enhanced-path="M 0 0 L 21600 0 21600 21600 0 21600 Z N"/></draw:custom-shape></text:span></text:p>
      <text:p text:style-name="P145">🧠 Nice-to-Have Features (Advanced Version)</text:p>
      <text:p text:style-name="P146">The project can be extended with:</text:p>
      <text:list text:style-name="LFO4" text:continue-numbering="true">
        <text:list-item>
          <text:p text:style-name="P147"><text:span text:style-name="T148">Dynamic configuration via<text:s/></text:span><text:span text:style-name="T149">config.json</text:span></text:p>
        </text:list-item>
        <text:list-item>
          <text:p text:style-name="P150">Add person dynamically during runtime</text:p>
        </text:list-item>
        <text:list-item>
          <text:p text:style-name="P151">Add new tables when full</text:p>
        </text:list-item>
        <text:list-item>
          <text:p text:style-name="P152">Avoid having people alone at a table</text:p>
        </text:list-item>
        <text:list-item>
          <text:p text:style-name="P153">Preferences system:</text:p>
          <text:list text:continue-numbering="true">
            <text:list-item>
              <text:p text:style-name="P154">“X wants to sit with Y”</text:p>
            </text:list-item>
            <text:list-item>
              <text:p text:style-name="P155">“X should not sit with Y”</text:p>
            </text:list-item>
          </text:list>
        </text:list-item>
        <text:list-item>
          <text:p text:style-name="P156">Statistics:</text:p>
          <text:list text:continue-numbering="true">
            <text:list-item>
              <text:p text:style-name="P157">total seats</text:p>
            </text:list-item>
            <text:list-item>
              <text:p text:style-name="P158">occupied seats</text:p>
            </text:list-item>
            <text:list-item>
              <text:p text:style-name="P159">free seats</text:p>
            </text:list-item>
          </text:list>
        </text:list-item>
        <text:list-item>
          <text:p text:style-name="P160">Interactive re-run system</text:p>
        </text:list-item>
      </text:list>
      <text:p text:style-name="P161"><text:span text:style-name="T162"><draw:custom-shape svg:x="0in" svg:y="0in" svg:width="6.30417in" svg:height="0.08819in" draw:z-index="0" draw:id="id3" draw:style-name="a3" draw:name="Horizontal Line 4" text:anchor-type="as-char"><svg:title/><svg:desc/><draw:enhanced-geometry draw:type="non-primitive" svg:viewBox="0 0 21600 21600" draw:enhanced-path="M 0 0 L 21600 0 21600 21600 0 21600 Z N"/></draw:custom-shape></text:span></text:p>
      <text:p text:style-name="P163"><text:span text:style-name="T164">⚠</text:span><text:span text:style-name="T165">️ Constraints</text:span></text:p>
      <text:p text:style-name="P166">Imports rules</text:p>
      <text:p text:style-name="P167">Only allowed:</text:p>
      <text:soft-page-break/>
      <text:p text:style-name="P168">from module import function_or_class</text:p>
      <text:p text:style-name="P169">Not allowed:</text:p>
      <text:p text:style-name="P170">import module</text:p>
      <text:p text:style-name="P171">import .module</text:p>
      <text:p text:style-name="P172">from .module import something</text:p>
      <text:p text:style-name="P173"><text:span text:style-name="T174"><draw:custom-shape svg:x="0in" svg:y="0in" svg:width="6.30417in" svg:height="0.08819in" draw:z-index="0" draw:id="id4" draw:style-name="a4" draw:name="Horizontal Line 5" text:anchor-type="as-char"><svg:title/><svg:desc/><draw:enhanced-geometry draw:type="non-primitive" svg:viewBox="0 0 21600 21600" draw:enhanced-path="M 0 0 L 21600 0 21600 21600 0 21600 Z N"/></draw:custom-shape></text:span></text:p>
      <text:p text:style-name="P175">🧼 Code Style Rules</text:p>
      <text:list text:style-name="LFO5" text:continue-numbering="true">
        <text:list-item>
          <text:p text:style-name="P176">Each class must include type hints</text:p>
        </text:list-item>
        <text:list-item>
          <text:p text:style-name="P177">Each function must include a docstring</text:p>
        </text:list-item>
        <text:list-item>
          <text:p text:style-name="P178">Code must be fully commented</text:p>
        </text:list-item>
        <text:list-item>
          <text:p text:style-name="P179">No unused or commented-out code</text:p>
        </text:list-item>
        <text:list-item>
          <text:p text:style-name="P180">Clean separation of concerns</text:p>
        </text:list-item>
      </text:list>
      <text:p text:style-name="P181"><text:span text:style-name="T182"><draw:custom-shape svg:x="0in" svg:y="0in" svg:width="6.30417in" svg:height="0.08819in" draw:z-index="0" draw:id="id5" draw:style-name="a5" draw:name="Horizontal Line 6" text:anchor-type="as-char"><svg:title/><svg:desc/><draw:enhanced-geometry draw:type="non-primitive" svg:viewBox="0 0 21600 21600" draw:enhanced-path="M 0 0 L 21600 0 21600 21600 0 21600 Z N"/></draw:custom-shape></text:span></text:p>
      <text:p text:style-name="P183">🧪 Testing</text:p>
      <text:p text:style-name="P184">The project includes manual tests inside files (commented code).</text:p>
      <text:p text:style-name="P185">To test:</text:p>
      <text:list text:style-name="LFO6" text:continue-numbering="true">
        <text:list-item>
          <text:p text:style-name="P186">Uncomment test sections in:</text:p>
          <text:list text:continue-numbering="true">
            <text:list-item>
              <text:p text:style-name="P187"><text:span text:style-name="T188">table.py</text:span></text:p>
            </text:list-item>
            <text:list-item>
              <text:p text:style-name="P189"><text:span text:style-name="T190">openspace.py</text:span></text:p>
            </text:list-item>
          </text:list>
        </text:list-item>
      </text:list>
      <text:p text:style-name="P191">Future improvement:</text:p>
      <text:list text:style-name="LFO7" text:continue-numbering="true">
        <text:list-item>
          <text:p text:style-name="P192">add automated tests (pytest)</text:p>
        </text:list-item>
      </text:list>
      <text:p text:style-name="P193"><text:span text:style-name="T194"><draw:custom-shape svg:x="0in" svg:y="0in" svg:width="6.30417in" svg:height="0.08819in" draw:z-index="0" draw:id="id6" draw:style-name="a6" draw:name="Horizontal Line 7" text:anchor-type="as-char"><svg:title/><svg:desc/><draw:enhanced-geometry draw:type="non-primitive" svg:viewBox="0 0 21600 21600" draw:enhanced-path="M 0 0 L 21600 0 21600 21600 0 21600 Z N"/></draw:custom-shape></text:span></text:p>
      <text:p text:style-name="P195"><text:span text:style-name="T196">📅</text:span><text:span text:style-name="T197"><text:s/>Timeline</text:span></text:p>
      <text:list text:style-name="LFO8" text:continue-numbering="true">
        <text:list-item>
          <text:p text:style-name="P198">Duration: 2 days</text:p>
        </text:list-item>
        <text:list-item>
          <text:p text:style-name="P199">Deadline: 29/05/26 – 4:00 PM</text:p>
        </text:list-item>
        <text:list-item>
          <text:p text:style-name="P200">Presentation: Monday during stand-up</text:p>
        </text:list-item>
      </text:list>
      <text:p text:style-name="P201"><text:span text:style-name="T202"><draw:custom-shape svg:x="0in" svg:y="0in" svg:width="6.30417in" svg:height="0.08819in" draw:z-index="0" draw:id="id7" draw:style-name="a7" draw:name="Horizontal Line 8" text:anchor-type="as-char"><svg:title/><svg:desc/><draw:enhanced-geometry draw:type="non-primitive" svg:viewBox="0 0 21600 21600" draw:enhanced-path="M 0 0 L 21600 0 21600 21600 0 21600 Z N"/></draw:custom-shape></text:span></text:p>
      <text:p text:style-name="P203"><text:span text:style-name="T204">🌿</text:span><text:span text:style-name="T205"><text:s/>Branch Strategy</text:span></text:p>
      <text:list text:style-name="LFO9" text:continue-numbering="true">
        <text:list-item>
          <text:p text:style-name="P206"><text:span text:style-name="T207">main</text:span><text:span text:style-name="T208"><text:s/>→ MVP version (required)</text:span></text:p>
        </text:list-item>
        <text:list-item>
          <text:p text:style-name="P209"><text:span text:style-name="T210">nice-to-have</text:span><text:span text:style-name="T211"><text:s/>→ extended features</text:span></text:p>
        </text:list-item>
      </text:list>
      <text:p text:style-name="P212">This separation ensures a clean and structured Git workflow.</text:p>
      <text:soft-page-break/>
      <text:p text:style-name="P213"><text:span text:style-name="T214"><draw:custom-shape svg:x="0in" svg:y="0in" svg:width="6.30417in" svg:height="0.08819in" draw:z-index="0" draw:id="id8" draw:style-name="a8" draw:name="Horizontal Line 9" text:anchor-type="as-char"><svg:title/><svg:desc/><draw:enhanced-geometry draw:type="non-primitive" svg:viewBox="0 0 21600 21600" draw:enhanced-path="M 0 0 L 21600 0 21600 21600 0 21600 Z N"/></draw:custom-shape></text:span></text:p>
      <text:p text:style-name="P215"><text:span text:style-name="T216">👤</text:span><text:span text:style-name="T217"><text:s/>Personal Situation</text:span></text:p>
      <text:p text:style-name="P218">Solo consolidation project focused on:</text:p>
      <text:list text:style-name="LFO10" text:continue-numbering="true">
        <text:list-item>
          <text:p text:style-name="P219">OOP design</text:p>
        </text:list-item>
        <text:list-item>
          <text:p text:style-name="P220">clean architecture</text:p>
        </text:list-item>
        <text:list-item>
          <text:p text:style-name="P221">file handling</text:p>
        </text:list-item>
        <text:list-item>
          <text:p text:style-name="P222">randomness algorithms</text:p>
        </text:list-item>
        <text:list-item>
          <text:p text:style-name="P223">scalable Python project structure</text:p>
        </text:list-item>
      </text:list>
      <text:p text:style-name="P224"><text:span text:style-name="T225"><draw:custom-shape svg:x="0in" svg:y="0in" svg:width="6.30417in" svg:height="0.08819in" draw:z-index="0" draw:id="id9" draw:style-name="a9" draw:name="Horizontal Line 10" text:anchor-type="as-char"><svg:title/><svg:desc/><draw:enhanced-geometry draw:type="non-primitive" svg:viewBox="0 0 21600 21600" draw:enhanced-path="M 0 0 L 21600 0 21600 21600 0 21600 Z N"/></draw:custom-shape></text:span></text:p>
      <text:p text:style-name="P226"><text:span text:style-name="T227">📌</text:span><text:span text:style-name="T228"><text:s/>Status</text:span></text:p>
      <text:p text:style-name="P229"><text:span text:style-name="T230">✔</text:span><text:span text:style-name="T231"><text:s/>MVP completed</text:span><text:span text:style-name="T232"><text:line-break/></text:span><text:span text:style-name="T233">✔</text:span><text:span text:style-name="T234"><text:s/>Clean architecture implemented</text:span><text:span text:style-name="T235"><text:line-break/></text:span><text:span text:style-name="T236">✔</text:span><text:span text:style-name="T237"><text:s/>Random assignment working</text:span><text:span text:style-name="T238"><text:line-break/></text:span><text:span text:style-name="T239">✔</text:span><text:span text:style-name="T240"><text:s/>Overflow handled</text:span><text:span text:style-name="T241"><text:line-break/></text:span><text:span text:style-name="T242">✔</text:span><text:span text:style-name="T243"><text:s/>Ready for evaluation</text:span></text:p>
      <text:p text:style-name="P244"/>
      <text:p text:style-name="P245">---</text:p>
      <text:p text:style-name="P246"/>
      <text:p text:style-name="P247">Si tu veux, je peux encore te faire :</text:p>
      <text:p text:style-name="P248">- :contentReference[oaicite:0]{index=0}</text:p>
      <text:p text:style-name="P249">- ou :contentReference[oaicite:1]{index=1}</text:p>
      <text:p text:style-name="P250">- ou :contentReference[oaicite:2]{index=2}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DejaVu Sans Mono" svg:font-family="DejaVu Sans Mono" style:font-family-generic="modern" style:font-pitch="fixed" svg:panose-1="2 11 6 9 3 8 4 2 2 4"/>
    <style:font-face style:name="Cambria Math" svg:font-family="Cambria Math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2" style:display-name="Titre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 fo:hyphenate="false"/>
    </style:style>
    <style:style style:name="Titre3" style:display-name="Titre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Titre3Car" style:display-name="Titre 3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  <text:outline-level-style text:level="3" style:num-format=""/>
    </text:outline-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/>
    </style:default-style>
  </office:styles>
  <office:automatic-styles>
    <text:list-style style:name="LFO1">
      <text:list-level-style-number text:level="1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number text:level="1" style:num-suffix="." style:num-format="1" text:start-value="3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Zen-Project</meta:initial-creator>
    <dc:creator>Zen-Project</dc:creator>
    <meta:creation-date>2026-05-28T17:57:00Z</meta:creation-date>
    <dc:date>2026-05-28T17:57:00Z</dc:date>
    <meta:template xlink:href="Normal" xlink:type="simple"/>
    <meta:editing-cycles>2</meta:editing-cycles>
    <meta:editing-duration>PT60S</meta:editing-duration>
    <meta:document-statistic meta:page-count="5" meta:paragraph-count="8" meta:word-count="634" meta:character-count="4114" meta:row-count="29" meta:non-whitespace-character-count="3488"/>
  </office:meta>
</office:document-meta>
</file>